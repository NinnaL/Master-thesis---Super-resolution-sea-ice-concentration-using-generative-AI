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100000335305656A1.png" manifest:media-type="image/png"/>
  <manifest:file-entry manifest:full-path="Pictures/1000C5D70000466200005EFB691EBC6D.svg" manifest:media-type="image/svg+xml"/>
  <manifest:file-entry manifest:full-path="Pictures/10000001000004E8000000E1E0B1BA5E.png" manifest:media-type="image/png"/>
  <manifest:file-entry manifest:full-path="Pictures/100000000000023200000268FCB4D4B7.png" manifest:media-type="image/png"/>
  <manifest:file-entry manifest:full-path="Pictures/10000000000003DD000001EA9C949D95.png" manifest:media-type="image/png"/>
  <manifest:file-entry manifest:full-path="Pictures/10000000000003E3000001EAB453C31A.png" manifest:media-type="image/png"/>
  <manifest:file-entry manifest:full-path="Pictures/1000000000000232000002687444C7A9.png" manifest:media-type="image/png"/>
  <manifest:file-entry manifest:full-path="Pictures/10000000000003DD000001EA2AD0A033.png" manifest:media-type="image/png"/>
  <manifest:file-entry manifest:full-path="Pictures/10000000000003E4000001EAA82F6A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93cm" loext:decorative="false"/>
      <style:paragraph-properties style:writing-mode="lr-tb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Min 10% between 0% and 100% ice</text:p>
              </text:list-item>
              <text:list-item>
                <text:p>Max 90% of 0% and 100% ice </text:p>
                <text:p/>
              </text:list-item>
              <text:list-item>
                <text:p>Per year balancing to prevent all samples from one year</text:p>
                <text:p/>
              </text:list-item>
              <text:list-item>
                <text:p>Total samples: 47122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6.352cm" svg:height="12.964cm" svg:x="0.905cm" svg:y="1.433cm">
          <draw:image xlink:href="Pictures/10000000000003E4000001EAA82F6A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166cm" svg:height="12.964cm" svg:x="0.998cm" svg:y="1.433cm">
          <draw:image xlink:href="Pictures/10000000000003DD000001EA2AD0A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4.369cm" svg:height="15.749cm" svg:x="6.896cm" svg:y="0.04cm">
          <draw:image xlink:href="Pictures/1000000000000232000002687444C7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325cm" svg:height="12.964cm" svg:x="0.918cm" svg:y="1.433cm">
          <draw:image xlink:href="Pictures/10000000000003E3000001EAB453C31A.png" xlink:type="simple" xlink:show="embed" xlink:actuate="onLoad" draw:mime-type="image/png">
            <text:p/>
          </draw:image>
        </draw:frame>
        <draw:frame draw:style-name="gr3" draw:text-style-name="P4" draw:layer="layout" svg:width="5.715cm" svg:height="0.962cm" svg:x="22.86cm" svg:y="14.605cm">
          <draw:text-box>
            <text:p>49504 s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166cm" svg:height="12.964cm" svg:x="0.998cm" svg:y="1.433cm">
          <draw:image xlink:href="Pictures/10000000000003DD000001EA9C949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4.369cm" svg:height="15.749cm" svg:x="6.896cm" svg:y="0.04cm">
          <draw:image xlink:href="Pictures/100000000000023200000268FCB4D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Train basis network – simple Unet</text:p>
                <text:list>
                  <text:list-item>
                    <text:p>Fix dataloader</text:p>
                  </text:list-item>
                </text:list>
              </text:list-item>
              <text:list-item>
                <text:p>Make better network</text:p>
              </text:list-item>
            </text:list>
          </draw:text-box>
        </draw:frame>
        <draw:frame draw:style-name="gr2" draw:text-style-name="P3" draw:layer="layout" svg:width="27.999cm" svg:height="5.014cm" svg:x="0.001cm" svg:y="9.591cm">
          <draw:image xlink:href="Pictures/10000001000004E8000000E1E0B1BA5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1.67cm" svg:height="15.749cm" svg:x="8.246cm" svg:y="0.04cm">
          <draw:image xlink:href="Pictures/1000C5D70000466200005EFB691EBC6D.svg" xlink:type="simple" xlink:show="embed" xlink:actuate="onLoad" draw:mime-type="image/svg+xml">
            <text:p/>
          </draw:image>
          <draw:image xlink:href="Pictures/100000010000026100000335305656A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28:31.385840339</meta:creation-date>
    <dc:date>2026-03-23T14:23:37.246797226</dc:date>
    <meta:editing-duration>PT3H34M46S</meta:editing-duration>
    <meta:editing-cycles>1</meta:editing-cycles>
    <meta:document-statistic meta:object-count="65"/>
    <meta:generator>LibreOffice/24.2.7.2$Linux_X86_64 LibreOffice_project/420$Build-2</meta:generator>
  </office:meta>
</office:document-meta>
</file>