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10000018C2BF50726.png" manifest:media-type="image/png"/>
  <manifest:file-entry manifest:full-path="Pictures/10000000000005D10000018C1314F162.png" manifest:media-type="image/png"/>
  <manifest:file-entry manifest:full-path="Pictures/10000000000008580000044971FA6425.png" manifest:media-type="image/png"/>
  <manifest:file-entry manifest:full-path="Pictures/10000001000005A000000730DBAF0852.png" manifest:media-type="image/png"/>
  <manifest:file-entry manifest:full-path="Pictures/100000000000085800000449DB0B9995.png" manifest:media-type="image/png"/>
  <manifest:file-entry manifest:full-path="Pictures/100000000000088D000001F752770D6F.png" manifest:media-type="image/png"/>
  <manifest:file-entry manifest:full-path="Pictures/10000000000008540000045F09D30D02.png" manifest:media-type="image/png"/>
  <manifest:file-entry manifest:full-path="Pictures/10000001000005A0000002A885A214EF.png" manifest:media-type="image/png"/>
  <manifest:file-entry manifest:full-path="Pictures/10000000000006FE000003D91D93DC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7.584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0.826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999cm" svg:height="15.406cm" svg:x="0.078cm" svg:y="0.211cm">
          <draw:image xlink:href="Pictures/10000000000006FE000003D91D93DC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999cm" svg:height="13.221cm" svg:x="0.078cm" svg:y="1.303cm">
          <draw:image xlink:href="Pictures/10000001000005A0000002A885A214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999cm" svg:height="14.379cm" svg:x="0.078cm" svg:y="0.724cm">
          <draw:image xlink:href="Pictures/100000000000085800000449DB0B99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2.325cm" svg:height="13.295cm" svg:x="7.62cm" svg:y="1.945cm">
          <draw:image xlink:href="Pictures/10000001000005A000000730DBAF0852.png" xlink:type="simple" xlink:show="embed" xlink:actuate="onLoad" draw:mime-type="image/png">
            <text:p/>
          </draw:image>
        </draw:frame>
        <draw:frame draw:style-name="gr4" draw:text-style-name="P1" draw:layer="layout" svg:width="12.325cm" svg:height="2.54cm" svg:x="15.994cm" svg:y="10.16cm">
          <draw:image xlink:href="Pictures/10000001000005A000000730DBAF08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999cm" svg:height="14.379cm" svg:x="0.078cm" svg:y="0.724cm">
          <draw:image xlink:href="Pictures/10000000000008580000044971FA64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999cm" svg:height="14.695cm" svg:x="0.078cm" svg:y="0.566cm">
          <draw:image xlink:href="Pictures/10000000000008540000045F09D30D0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L2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999cm" svg:height="7.446cm" svg:x="0.078cm" svg:y="4.191cm">
          <draw:image xlink:href="Pictures/10000000000005D10000018C1314F1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L1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999cm" svg:height="7.446cm" svg:x="0.078cm" svg:y="4.191cm">
          <draw:image xlink:href="Pictures/10000000000005D10000018C2BF507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Diffusion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7.999cm" svg:height="6.433cm" svg:x="0.078cm" svg:y="4.697cm">
          <draw:image xlink:href="Pictures/100000000000088D000001F752770D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08:28:31.385840339</meta:creation-date>
    <dc:date>2026-05-04T12:00:53.138985058</dc:date>
    <meta:editing-duration>PT4H18M48S</meta:editing-duration>
    <meta:editing-cycles>2</meta:editing-cycles>
    <meta:generator>LibreOffice/24.2.7.2$Linux_X86_64 LibreOffice_project/420$Build-2</meta:generator>
    <meta:document-statistic meta:object-count="65"/>
  </office:meta>
</office:document-meta>
</file>